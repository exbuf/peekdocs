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Meeting called to order at 10:00 AM on March 3, 2026.</text:p>
      <text:p>The committee reviewed the proposed budget for fiscal year 2027.</text:p>
      <text:p>After discussion, the budget was approved unanimously.</text:p>
      <text:p>Next meeting scheduled for April 7, 2026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